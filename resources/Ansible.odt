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0f1115" loext:opacity="100%" style:font-name="Menlo" fo:font-size="9pt" fo:background-color="#ffffff"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Menlo" fo:font-size="9.75pt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 style:font-name="Menlo" fo:font-size="9.75pt" fo:font-style="normal" fo:font-weight="normal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</style:style>
    <style:style style:name="P5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/>
    </style:style>
    <style:style style:name="T1" style:family="text">
      <style:text-properties fo:font-variant="normal" fo:text-transform="none" fo:color="#0f1115" loext:opacity="100%" fo:letter-spacing="normal"/>
    </style:style>
    <style:style style:name="T2" style:family="text">
      <style:text-properties fo:font-variant="normal" fo:text-transform="none" fo:color="#0f1115" loext:opacity="100%" style:font-name="Menlo" fo:font-size="15pt" fo:letter-spacing="normal" fo:font-style="normal" fo:font-weight="bold" fo:background-color="#ebeef2" loext:char-shading-value="0" loext:padding="0in" loext:border="none"/>
    </style:style>
    <style:style style:name="T3" style:family="text">
      <style:text-properties fo:color="#383a42" loext:opacity="100%"/>
    </style:style>
    <style:style style:name="T4" style:family="text">
      <style:text-properties fo:color="#50a14f" loext:opacity="100%"/>
    </style:style>
    <style:style style:name="T5" style:family="text">
      <style:text-properties fo:color="#b76b01" loext:opacity="100%"/>
    </style:style>
    <style:style style:name="T6" style:family="text">
      <style:text-properties fo:color="#b76b01" loext:opacity="100%" style:font-name="Menlo" fo:font-size="9.75pt" fo:font-style="normal" fo:font-weight="normal"/>
    </style:style>
    <style:style style:name="T7" style:family="text">
      <style:text-properties fo:color="#383a42" loext:opacity="100%" style:font-name="Menlo" fo:font-size="9.75pt" fo:font-style="normal" fo:font-weight="normal"/>
    </style:style>
    <style:style style:name="T8" style:family="text">
      <style:text-properties style:font-name="Menlo" fo:font-size="9.75pt" fo:font-style="normal" fo:font-weight="normal"/>
    </style:style>
    <style:style style:name="T9" style:family="text">
      <style:text-properties fo:color="#e45649" loext:opacity="100%" style:font-name="Menlo" fo:font-size="9.75pt" fo:font-style="normal" fo:font-weight="normal"/>
    </style:style>
    <style:style style:name="T10" style:family="text">
      <style:text-properties fo:color="#50a14f" loext:opacity="100%" style:font-name="Menlo"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📄 </text:span><text:span text:style-name="Source_20_Text"><text:span text:style-name="T2">inventory.ini</text:span></text:span></text:h>
      <text:p text:style-name="P1">ini</text:p>
      <text:p text:style-name="P2"><text:span text:style-name="T3">[</text:span><text:span text:style-name="T4">webservers</text:span><text:span text:style-name="T3">]</text:span></text:p>
      <text:p text:style-name="P3">192.168.1.10</text:p>
      <text:p text:style-name="P3">192.168.1.11</text:p>
      <text:p text:style-name="P4"/>
      <text:p text:style-name="P2"><text:span text:style-name="T3">[</text:span><text:span text:style-name="T4">all:vars</text:span><text:span text:style-name="T3">]</text:span></text:p>
      <text:p text:style-name="P2"><text:span text:style-name="T5">ansible_user</text:span><text:span text:style-name="T3">=</text:span><text:span text:style-name="T4">ubuntu</text:span></text:p>
      <text:p text:style-name="P2"><text:span text:style-name="T5">ansible_python_interpreter</text:span><text:span text:style-name="T3">=</text:span><text:span text:style-name="T4">/usr/bin/python3</text:span></text:p>
      <text:h text:style-name="P5" text:outline-level="3"><text:span text:style-name="T1">📄 </text:span><text:span text:style-name="Source_20_Text"><text:span text:style-name="T2">01-ping.yml</text:span></text:span></text:h>
      <text:p text:style-name="P1">yaml</text:p>
      <text:p text:style-name="P2"><text:span text:style-name="T3">-</text:span> <text:span text:style-name="T5">name</text:span><text:span text:style-name="T3">:</text:span> Test connectivity</text:p>
      <text:p text:style-name="P6"><text:s text:c="2"/><text:span text:style-name="T6">hosts</text:span><text:span text:style-name="T7">:</text:span><text:span text:style-name="T8"> all</text:span></text:p>
      <text:p text:style-name="P6"><text:s text:c="2"/><text:span text:style-name="T6">task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Ping all servers</text:span></text:p>
      <text:p text:style-name="P6"><text:s text:c="6"/><text:span text:style-name="T8">ping</text:span><text:span text:style-name="T7">:</text:span></text:p>
      <text:h text:style-name="P5" text:outline-level="3"><text:span text:style-name="T1">📄 </text:span><text:span text:style-name="Source_20_Text"><text:span text:style-name="T2">02-install-nginx.yml</text:span></text:span></text:h>
      <text:p text:style-name="P1">yaml</text:p>
      <text:p text:style-name="P2"><text:span text:style-name="T3">-</text:span> <text:span text:style-name="T5">name</text:span><text:span text:style-name="T3">:</text:span> Install Nginx</text:p>
      <text:p text:style-name="P6"><text:s text:c="2"/><text:span text:style-name="T6">hosts</text:span><text:span text:style-name="T7">:</text:span><text:span text:style-name="T8"> webservers</text:span></text:p>
      <text:p text:style-name="P6"><text:s text:c="2"/><text:span text:style-name="T6">become</text:span><text:span text:style-name="T7">:</text:span><text:span text:style-name="T8"> yes</text:span></text:p>
      <text:p text:style-name="P6"><text:s text:c="2"/><text:span text:style-name="T6">task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Install nginx package</text:span></text:p>
      <text:p text:style-name="P6"><text:s text:c="6"/><text:span text:style-name="T6">apt</text:span><text:span text:style-name="T7">:</text:span></text:p>
      <text:p text:style-name="P6"><text:s text:c="8"/><text:span text:style-name="T6">name</text:span><text:span text:style-name="T7">:</text:span><text:span text:style-name="T8"> nginx</text:span></text:p>
      <text:p text:style-name="P6"><text:s text:c="8"/><text:span text:style-name="T6">state</text:span><text:span text:style-name="T7">:</text:span><text:span text:style-name="T8"> present</text:span></text:p>
      <text:p text:style-name="P6"><text:s text:c="8"/><text:span text:style-name="T6">update_cache</text:span><text:span text:style-name="T7">:</text:span><text:span text:style-name="T8"> yes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Ensure nginx is running</text:span></text:p>
      <text:p text:style-name="P6"><text:s text:c="6"/><text:span text:style-name="T6">service</text:span><text:span text:style-name="T7">:</text:span></text:p>
      <text:p text:style-name="P6"><text:s text:c="8"/><text:span text:style-name="T6">name</text:span><text:span text:style-name="T7">:</text:span><text:span text:style-name="T8"> nginx</text:span></text:p>
      <text:p text:style-name="P6"><text:s text:c="8"/><text:span text:style-name="T6">state</text:span><text:span text:style-name="T7">:</text:span><text:span text:style-name="T8"> started</text:span></text:p>
      <text:p text:style-name="P6"><text:s text:c="8"/><text:span text:style-name="T6">enabled</text:span><text:span text:style-name="T7">:</text:span><text:span text:style-name="T8"> </text:span><text:span text:style-name="T9">true</text:span></text:p>
      <text:h text:style-name="P5" text:outline-level="3"><text:soft-page-break/><text:span text:style-name="T1">📄 </text:span><text:span text:style-name="Source_20_Text"><text:span text:style-name="T2">03-deploy-website.yml</text:span></text:span></text:h>
      <text:p text:style-name="P1">yaml</text:p>
      <text:p text:style-name="P2"><text:span text:style-name="T3">-</text:span> <text:span text:style-name="T5">name</text:span><text:span text:style-name="T3">:</text:span> Deploy website</text:p>
      <text:p text:style-name="P6"><text:s text:c="2"/><text:span text:style-name="T6">hosts</text:span><text:span text:style-name="T7">:</text:span><text:span text:style-name="T8"> webservers</text:span></text:p>
      <text:p text:style-name="P6"><text:s text:c="2"/><text:span text:style-name="T6">become</text:span><text:span text:style-name="T7">:</text:span><text:span text:style-name="T8"> yes</text:span></text:p>
      <text:p text:style-name="P6"><text:s text:c="2"/><text:span text:style-name="T6">task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Create index page</text:span></text:p>
      <text:p text:style-name="P6"><text:s text:c="6"/><text:span text:style-name="T6">copy</text:span><text:span text:style-name="T7">:</text:span></text:p>
      <text:p text:style-name="P6"><text:s text:c="8"/><text:span text:style-name="T6">content</text:span><text:span text:style-name="T7">:</text:span><text:span text:style-name="T8"> </text:span><text:span text:style-name="T10">"&lt;h1&gt;Hello from Ansible&lt;/h1&gt;"</text:span></text:p>
      <text:p text:style-name="P6"><text:s text:c="8"/><text:span text:style-name="T6">dest</text:span><text:span text:style-name="T7">:</text:span><text:span text:style-name="T8"> /var/www/html/index.html</text:span></text:p>
      <text:h text:style-name="P5" text:outline-level="3"><text:span text:style-name="T1">📄 </text:span><text:span text:style-name="Source_20_Text"><text:span text:style-name="T2">04-install-packages.yml</text:span></text:span></text:h>
      <text:p text:style-name="P1">yaml</text:p>
      <text:p text:style-name="P2"><text:span text:style-name="T3">-</text:span> <text:span text:style-name="T5">name</text:span><text:span text:style-name="T3">:</text:span> Install common tools</text:p>
      <text:p text:style-name="P6"><text:s text:c="2"/><text:span text:style-name="T6">hosts</text:span><text:span text:style-name="T7">:</text:span><text:span text:style-name="T8"> all</text:span></text:p>
      <text:p text:style-name="P6"><text:s text:c="2"/><text:span text:style-name="T6">become</text:span><text:span text:style-name="T7">:</text:span><text:span text:style-name="T8"> yes</text:span></text:p>
      <text:p text:style-name="P6"><text:s text:c="2"/><text:span text:style-name="T6">task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Install packages</text:span></text:p>
      <text:p text:style-name="P6"><text:s text:c="6"/><text:span text:style-name="T6">apt</text:span><text:span text:style-name="T7">:</text:span></text:p>
      <text:p text:style-name="P6"><text:s text:c="8"/><text:span text:style-name="T6">name</text:span><text:span text:style-name="T7">:</text:span></text:p>
      <text:p text:style-name="P6"><text:s text:c="10"/><text:span text:style-name="T7">-</text:span><text:span text:style-name="T8"> git</text:span></text:p>
      <text:p text:style-name="P6"><text:s text:c="10"/><text:span text:style-name="T7">-</text:span><text:span text:style-name="T8"> curl</text:span></text:p>
      <text:p text:style-name="P6"><text:s text:c="10"/><text:span text:style-name="T7">-</text:span><text:span text:style-name="T8"> vim</text:span></text:p>
      <text:p text:style-name="P6"><text:s text:c="10"/><text:span text:style-name="T7">-</text:span><text:span text:style-name="T8"> htop</text:span></text:p>
      <text:p text:style-name="P6"><text:s text:c="8"/><text:span text:style-name="T6">state</text:span><text:span text:style-name="T7">:</text:span><text:span text:style-name="T8"> present</text:span></text:p>
      <text:h text:style-name="P5" text:outline-level="3"><text:span text:style-name="T1">📄 </text:span><text:span text:style-name="Source_20_Text"><text:span text:style-name="T2">05-variables.yml</text:span></text:span></text:h>
      <text:p text:style-name="P1">yaml</text:p>
      <text:p text:style-name="P2"><text:span text:style-name="T3">-</text:span> <text:span text:style-name="T5">name</text:span><text:span text:style-name="T3">:</text:span> Install package using variable</text:p>
      <text:p text:style-name="P6"><text:s text:c="2"/><text:span text:style-name="T6">hosts</text:span><text:span text:style-name="T7">:</text:span><text:span text:style-name="T8"> all</text:span></text:p>
      <text:p text:style-name="P6"><text:s text:c="2"/><text:span text:style-name="T6">become</text:span><text:span text:style-name="T7">:</text:span><text:span text:style-name="T8"> yes</text:span></text:p>
      <text:p text:style-name="P6"><text:s text:c="2"/><text:span text:style-name="T6">vars</text:span><text:span text:style-name="T7">:</text:span></text:p>
      <text:p text:style-name="P6"><text:s text:c="4"/><text:span text:style-name="T6">package_name</text:span><text:span text:style-name="T7">:</text:span><text:span text:style-name="T8"> nginx</text:span></text:p>
      <text:p text:style-name="P6"><text:s text:c="2"/><text:span text:style-name="T6">task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Install package</text:span></text:p>
      <text:p text:style-name="P6"><text:s text:c="6"/><text:span text:style-name="T6">apt</text:span><text:span text:style-name="T7">:</text:span></text:p>
      <text:p text:style-name="P6"><text:soft-page-break/><text:s text:c="8"/><text:span text:style-name="T6">name</text:span><text:span text:style-name="T7">:</text:span><text:span text:style-name="T8"> </text:span><text:span text:style-name="T10">"{{ package_name }}"</text:span></text:p>
      <text:p text:style-name="P6"><text:s text:c="8"/><text:span text:style-name="T6">state</text:span><text:span text:style-name="T7">:</text:span><text:span text:style-name="T8"> present</text:span></text:p>
      <text:h text:style-name="P5" text:outline-level="3"><text:span text:style-name="T1">📄 </text:span><text:span text:style-name="Source_20_Text"><text:span text:style-name="T2">06-loop-users.yml</text:span></text:span></text:h>
      <text:p text:style-name="P1">yaml</text:p>
      <text:p text:style-name="P2"><text:span text:style-name="T3">-</text:span> <text:span text:style-name="T5">name</text:span><text:span text:style-name="T3">:</text:span> Create multiple users</text:p>
      <text:p text:style-name="P6"><text:s text:c="2"/><text:span text:style-name="T6">hosts</text:span><text:span text:style-name="T7">:</text:span><text:span text:style-name="T8"> all</text:span></text:p>
      <text:p text:style-name="P6"><text:s text:c="2"/><text:span text:style-name="T6">become</text:span><text:span text:style-name="T7">:</text:span><text:span text:style-name="T8"> yes</text:span></text:p>
      <text:p text:style-name="P6"><text:s text:c="2"/><text:span text:style-name="T6">task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Add users</text:span></text:p>
      <text:p text:style-name="P6"><text:s text:c="6"/><text:span text:style-name="T6">user</text:span><text:span text:style-name="T7">:</text:span></text:p>
      <text:p text:style-name="P6"><text:s text:c="8"/><text:span text:style-name="T6">name</text:span><text:span text:style-name="T7">:</text:span><text:span text:style-name="T8"> </text:span><text:span text:style-name="T10">"{{ item }}"</text:span></text:p>
      <text:p text:style-name="P6"><text:s text:c="8"/><text:span text:style-name="T6">state</text:span><text:span text:style-name="T7">:</text:span><text:span text:style-name="T8"> present</text:span></text:p>
      <text:p text:style-name="P6"><text:s text:c="8"/><text:span text:style-name="T6">shell</text:span><text:span text:style-name="T7">:</text:span><text:span text:style-name="T8"> /bin/bash</text:span></text:p>
      <text:p text:style-name="P6"><text:s text:c="6"/><text:span text:style-name="T6">loop</text:span><text:span text:style-name="T7">:</text:span></text:p>
      <text:p text:style-name="P6"><text:s text:c="8"/><text:span text:style-name="T7">-</text:span><text:span text:style-name="T8"> dev1</text:span></text:p>
      <text:p text:style-name="P6"><text:s text:c="8"/><text:span text:style-name="T7">-</text:span><text:span text:style-name="T8"> dev2</text:span></text:p>
      <text:p text:style-name="P6"><text:s text:c="8"/><text:span text:style-name="T7">-</text:span><text:span text:style-name="T8"> dev3</text:span></text:p>
      <text:h text:style-name="P5" text:outline-level="3"><text:span text:style-name="T1">📄 </text:span><text:span text:style-name="Source_20_Text"><text:span text:style-name="T2">07-conditionals.yml</text:span></text:span></text:h>
      <text:p text:style-name="P1">yaml</text:p>
      <text:p text:style-name="P2"><text:span text:style-name="T3">-</text:span> <text:span text:style-name="T5">name</text:span><text:span text:style-name="T3">:</text:span> Install on Debian systems only</text:p>
      <text:p text:style-name="P6"><text:s text:c="2"/><text:span text:style-name="T6">hosts</text:span><text:span text:style-name="T7">:</text:span><text:span text:style-name="T8"> all</text:span></text:p>
      <text:p text:style-name="P6"><text:s text:c="2"/><text:span text:style-name="T6">become</text:span><text:span text:style-name="T7">:</text:span><text:span text:style-name="T8"> yes</text:span></text:p>
      <text:p text:style-name="P6"><text:s text:c="2"/><text:span text:style-name="T6">task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Install nginx</text:span></text:p>
      <text:p text:style-name="P6"><text:s text:c="6"/><text:span text:style-name="T6">apt</text:span><text:span text:style-name="T7">:</text:span></text:p>
      <text:p text:style-name="P6"><text:s text:c="8"/><text:span text:style-name="T6">name</text:span><text:span text:style-name="T7">:</text:span><text:span text:style-name="T8"> nginx</text:span></text:p>
      <text:p text:style-name="P6"><text:s text:c="8"/><text:span text:style-name="T6">state</text:span><text:span text:style-name="T7">:</text:span><text:span text:style-name="T8"> present</text:span></text:p>
      <text:p text:style-name="P6"><text:s text:c="6"/><text:span text:style-name="T6">when</text:span><text:span text:style-name="T7">:</text:span><text:span text:style-name="T8"> ansible_os_family == "Debian"</text:span></text:p>
      <text:h text:style-name="P5" text:outline-level="3"><text:span text:style-name="T1">📄 </text:span><text:span text:style-name="Source_20_Text"><text:span text:style-name="T2">08-file-copy.yml</text:span></text:span></text:h>
      <text:p text:style-name="P1">yaml</text:p>
      <text:p text:style-name="P2"><text:span text:style-name="T3">-</text:span> <text:span text:style-name="T5">name</text:span><text:span text:style-name="T3">:</text:span> Deploy configuration file</text:p>
      <text:p text:style-name="P6"><text:s text:c="2"/><text:span text:style-name="T6">hosts</text:span><text:span text:style-name="T7">:</text:span><text:span text:style-name="T8"> webservers</text:span></text:p>
      <text:p text:style-name="P6"><text:soft-page-break/><text:s text:c="2"/><text:span text:style-name="T6">become</text:span><text:span text:style-name="T7">:</text:span><text:span text:style-name="T8"> yes</text:span></text:p>
      <text:p text:style-name="P6"><text:s text:c="2"/><text:span text:style-name="T6">task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Copy config file</text:span></text:p>
      <text:p text:style-name="P6"><text:s text:c="6"/><text:span text:style-name="T6">copy</text:span><text:span text:style-name="T7">:</text:span></text:p>
      <text:p text:style-name="P6"><text:s text:c="8"/><text:span text:style-name="T6">src</text:span><text:span text:style-name="T7">:</text:span><text:span text:style-name="T8"> nginx.conf</text:span></text:p>
      <text:p text:style-name="P6"><text:s text:c="8"/><text:span text:style-name="T6">dest</text:span><text:span text:style-name="T7">:</text:span><text:span text:style-name="T8"> /etc/nginx/nginx.conf</text:span></text:p>
      <text:p text:style-name="P6"><text:s text:c="6"/><text:span text:style-name="T6">notify</text:span><text:span text:style-name="T7">:</text:span><text:span text:style-name="T8"> Restart nginx</text:span></text:p>
      <text:p text:style-name="P6"><text:s text:c="2"/><text:span text:style-name="T6">handler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Restart nginx</text:span></text:p>
      <text:p text:style-name="P6"><text:s text:c="6"/><text:span text:style-name="T6">service</text:span><text:span text:style-name="T7">:</text:span></text:p>
      <text:p text:style-name="P6"><text:s text:c="8"/><text:span text:style-name="T6">name</text:span><text:span text:style-name="T7">:</text:span><text:span text:style-name="T8"> nginx</text:span></text:p>
      <text:p text:style-name="P6"><text:s text:c="8"/><text:span text:style-name="T6">state</text:span><text:span text:style-name="T7">:</text:span><text:span text:style-name="T8"> restarted</text:span></text:p>
      <text:h text:style-name="P5" text:outline-level="3"><text:span text:style-name="T1">📄 </text:span><text:span text:style-name="Source_20_Text"><text:span text:style-name="T2">09-handlers.yml</text:span></text:span></text:h>
      <text:p text:style-name="P1">yaml</text:p>
      <text:p text:style-name="P2"><text:span text:style-name="T3">-</text:span> <text:span text:style-name="T5">name</text:span><text:span text:style-name="T3">:</text:span> Handler example</text:p>
      <text:p text:style-name="P6"><text:s text:c="2"/><text:span text:style-name="T6">hosts</text:span><text:span text:style-name="T7">:</text:span><text:span text:style-name="T8"> webservers</text:span></text:p>
      <text:p text:style-name="P6"><text:s text:c="2"/><text:span text:style-name="T6">become</text:span><text:span text:style-name="T7">:</text:span><text:span text:style-name="T8"> yes</text:span></text:p>
      <text:p text:style-name="P6"><text:s text:c="2"/><text:span text:style-name="T6">task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Update nginx config</text:span></text:p>
      <text:p text:style-name="P6"><text:s text:c="6"/><text:span text:style-name="T6">copy</text:span><text:span text:style-name="T7">:</text:span></text:p>
      <text:p text:style-name="P6"><text:s text:c="8"/><text:span text:style-name="T6">content</text:span><text:span text:style-name="T7">:</text:span><text:span text:style-name="T8"> </text:span><text:span text:style-name="T10">"worker_processes 4;"</text:span></text:p>
      <text:p text:style-name="P6"><text:s text:c="8"/><text:span text:style-name="T6">dest</text:span><text:span text:style-name="T7">:</text:span><text:span text:style-name="T8"> /etc/nginx/nginx.conf</text:span></text:p>
      <text:p text:style-name="P6"><text:s text:c="6"/><text:span text:style-name="T6">notify</text:span><text:span text:style-name="T7">:</text:span><text:span text:style-name="T8"> Restart nginx</text:span></text:p>
      <text:p text:style-name="P6"><text:s text:c="2"/><text:span text:style-name="T6">handlers</text:span><text:span text:style-name="T7">:</text:span></text:p>
      <text:p text:style-name="P6"><text:s text:c="4"/><text:span text:style-name="T7">-</text:span><text:span text:style-name="T8"> </text:span><text:span text:style-name="T6">name</text:span><text:span text:style-name="T7">:</text:span><text:span text:style-name="T8"> Restart nginx</text:span></text:p>
      <text:p text:style-name="P6"><text:s text:c="6"/><text:span text:style-name="T6">service</text:span><text:span text:style-name="T7">:</text:span></text:p>
      <text:p text:style-name="P6"><text:s text:c="8"/><text:span text:style-name="T6">name</text:span><text:span text:style-name="T7">:</text:span><text:span text:style-name="T8"> nginx</text:span></text:p>
      <text:p text:style-name="P6"><text:s text:c="8"/><text:span text:style-name="T6">state</text:span><text:span text:style-name="T7">:</text:span><text:span text:style-name="T8"> restarted</text:span></text:p>
      <text:h text:style-name="P5" text:outline-level="3"><text:span text:style-name="T1">📄 </text:span><text:span text:style-name="Source_20_Text"><text:span text:style-name="T2">10-role-based.yml</text:span></text:span></text:h>
      <text:p text:style-name="P1">yaml</text:p>
      <text:p text:style-name="P2"><text:span text:style-name="T3">-</text:span> <text:span text:style-name="T5">name</text:span><text:span text:style-name="T3">:</text:span> Use web role</text:p>
      <text:p text:style-name="P6"><text:s text:c="2"/><text:span text:style-name="T6">hosts</text:span><text:span text:style-name="T7">:</text:span><text:span text:style-name="T8"> webservers</text:span></text:p>
      <text:p text:style-name="P6"><text:s text:c="2"/><text:span text:style-name="T6">become</text:span><text:span text:style-name="T7">:</text:span><text:span text:style-name="T8"> yes</text:span></text:p>
      <text:p text:style-name="P6"><text:s text:c="2"/><text:span text:style-name="T6">roles</text:span><text:span text:style-name="T7">:</text:span></text:p>
      <text:p text:style-name="P6"><text:s text:c="4"/><text:span text:style-name="T7">-</text:span><text:span text:style-name="T8"> web</text:span></text:p>
      <text:p text:style-name="Text_20_body"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brahim Amreya</meta:initial-creator>
    <meta:creation-date>2026-05-05T15:02:39.664904612</meta:creation-date>
    <dc:date>2026-05-05T15:03:24.797123744</dc:date>
    <dc:creator>Ibrahim Amreya</dc:creator>
    <meta:editing-duration>PT45S</meta:editing-duration>
    <meta:editing-cycles>1</meta:editing-cycles>
    <meta:document-statistic meta:table-count="0" meta:image-count="0" meta:object-count="0" meta:page-count="5" meta:paragraph-count="133" meta:word-count="291" meta:character-count="2367" meta:non-whitespace-character-count="1727"/>
    <meta:generator>LibreOffice/26.2.3.2$Linux_X86_64 LibreOffice_project/70e089b17412e4cb7773e41413306b17a2328c34</meta:generator>
  </office:meta>
</office:document-meta>
</file>